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 style:parent-style-name="Graphics">
      <style:graphic-properties draw:fill="none" fo:clip="rect(0in, 0in, 0in, 0in)" draw:stroke="non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951" style:parent-style-name="Graphics">
      <style:graphic-properties draw:fill="none" draw:stroke="non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 style:parent-style-name="Graphics">
      <style:graphic-properties draw:fill="none" fo:clip="rect(0in, 0in, 0in, 0in)" draw:stroke="none"/>
    </style:style>
    <style:style style:family="graphic" style:name="a957" style:parent-style-name="Graphics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 style:parent-style-name="Graphics">
      <style:graphic-properties draw:fill="none" fo:clip="rect(0in, 0in, 0in, 0in)" draw:stroke="non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7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964" style:parent-style-name="Graphics">
      <style:graphic-properties draw:fill="none" draw:stroke="non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6" style:parent-style-name="Graphics">
      <style:graphic-properties draw:fill="none" fo:clip="rect(0in, 0in, 0in, 0in)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 style:parent-style-name="Graphics">
      <style:graphic-properties draw:fill="none" fo:clip="rect(0in, 0in, 0in, 0in)" draw:stroke="non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 style:parent-style-name="Graphics">
      <style:graphic-properties draw:fill="none" fo:clip="rect(0in, 0in, 0in, 0in)" draw:stroke="non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 style:parent-style-name="Graphics">
      <style:graphic-properties draw:fill="none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solid" svg:stroke-width="0.01389in" svg:stroke-color="#000000" svg:strok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981" style:parent-style-name="Graphics">
      <style:graphic-properties draw:fill="none" fo:clip="rect(2.71064in, 0in, 0in, 0in)" draw:stroke="none"/>
    </style:style>
    <style:style style:family="graphic" style:name="a982" style:parent-style-name="Graphics">
      <style:graphic-properties draw:fill="none" draw:stroke="none"/>
    </style:style>
    <style:style style:family="graphic" style:name="a983" style:parent-style-name="Graphics">
      <style:graphic-properties draw:fill="none" draw:stroke="non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6" style:parent-style-name="Graphics">
      <style:graphic-properties draw:fill="none" fo:clip="rect(0in, 0in, 0in, 0in)" draw:stroke="non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1" style:parent-style-name="Graphics">
      <style:graphic-properties draw:fill="none" fo:clip="rect(0in, 0in, 0in, 0in)" draw:stroke="non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844" style:parent-style-name="Graphics">
      <style:graphic-properties draw:fill="none" draw:stroke="non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45" style:parent-style-name="Graphics">
      <style:graphic-properties draw:fill="none" draw:stroke="non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 style:parent-style-name="Graphics">
      <style:graphic-properties draw:fill="none" draw:stroke="non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 style:parent-style-name="Graphics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3" style:parent-style-name="Graphics">
      <style:graphic-properties draw:fill="none" fo:clip="rect(0in, 0in, 0in, 0in)" draw:stroke="non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868" style:parent-style-name="Graphics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e59edd" style:text-line-through-type="none" style:text-line-through-style="none" style:text-line-through-width="auto" style:text-line-through-color="font-color" style:text-position="30% 66.6667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59edd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e59edd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e59edd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e59edd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fo:clip="rect(0in, 0in, 0in, 0in)" draw:stroke="non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47d45a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884" style:parent-style-name="Graphics">
      <style:graphic-properties draw:fill="none" fo:clip="rect(0in, 0in, 0in, 0in)" draw:stroke="non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 style:parent-style-name="Graphics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 style:parent-style-name="Graphics">
      <style:graphic-properties draw:fill="none" draw:stroke="none"/>
    </style:style>
    <style:style style:family="paragraph" style:name="a10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47d45a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 style:parent-style-name="Graphics">
      <style:graphic-properties draw:fill="none" draw:stroke="none"/>
    </style:style>
    <style:style style:family="graphic" style:name="a1051">
      <style:graphic-properties draw:fill="none" draw:stroke="solid" svg:stroke-width="0.04167in" svg:stroke-color="#ff0000" svg:stroke-opacity="100%" draw:stroke-linejoin="miter" svg:stroke-linecap="butt"/>
    </style:style>
    <style:style style:family="text" style:name="a8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draw:fill="none" draw:stroke="solid" svg:stroke-width="0.04167in" svg:stroke-color="#ff0000" svg:stroke-opacity="100%" draw:stroke-linejoin="miter" svg:stroke-linecap="butt"/>
    </style:style>
    <style:style style:family="paragraph" style:name="a8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none" draw:stroke="solid" svg:stroke-width="0.04167in" svg:stroke-color="#ff0000" svg:stroke-opacity="100%" draw:stroke-linejoin="miter" svg:stroke-linecap="butt"/>
    </style:style>
    <style:style style:family="drawing-page" style:name="a10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e59edd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 style:parent-style-name="Graphics">
      <style:graphic-properties draw:fill="none" fo:clip="rect(0in, 0in, 0in, 0in)" draw:stroke="non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732" style:parent-style-name="Graphics">
      <style:graphic-properties draw:fill="none" fo:clip="rect(0in, 0in, 0in, 0in)" draw:stroke="non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47d45a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draw:fill="none" draw:stroke="solid" svg:stroke-width="0.01389in" svg:stroke-color="#000000" svg:stroke-opacity="100%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746">
      <style:graphic-properties draw:fill="none" draw:stroke="solid" svg:stroke-width="0.01389in" svg:stroke-color="#000000" svg:stroke-opacity="100%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1" style:parent-style-name="Graphics">
      <style:graphic-properties draw:fill="none" fo:clip="rect(0in, 0in, 0in, 0in)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 style:parent-style-name="Graphics">
      <style:graphic-properties draw:fill="none" fo:clip="rect(0in, 0in, 0in, 0in)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31" draw:master-page-name="Master1-Layout1-title-Titeldia" presentation:presentation-page-layout-name="Master1-PPL1" draw:id="Slide-256">
        <draw:frame draw:id="id69" draw:style-name="a732" draw:name="Picture 2" svg:x="0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70" draw:style-name="a735" draw:name="Tekstvak 4" svg:x="0.46in" svg:y="0.35in" svg:width="4.63in" svg:height="1.00977in">
          <draw:text-box>
            <text:p text:style-name="a734" text:class-names="" text:cond-style-name=""><text:span text:style-name="a733" text:class-names="">Team Narwal</text:span></text:p>
          </draw:text-box>
          <svg:title/>
          <svg:desc/>
        </draw:frame>
        <draw:frame draw:id="id71" draw:style-name="a740" draw:name="Tekstvak 5" svg:x="0.82in" svg:y="1.8in" svg:width="1.03in" svg:height="0.40391in">
          <draw:text-box>
            <text:p text:style-name="a739" text:class-names="" text:cond-style-name=""><text:span text:style-name="a736" text:class-names="">Sprint<text:s text:c="1"/></text:span><text:span text:style-name="a737" text:class-names="">2</text:span><text:span text:style-name="a738" text:class-names=""/></text:p>
          </draw:text-box>
          <svg:title/>
          <svg:desc/>
        </draw:frame>
        <draw:frame draw:id="id72" draw:style-name="a745" draw:name="Tekstvak 5" svg:x="0.82in" svg:y="2.24023in" svg:width="1.52333in" svg:height="0.40391in">
          <draw:text-box>
            <text:p text:style-name="a744" text:class-names="" text:cond-style-name=""><text:span text:style-name="a741" text:class-names="">Milestone</text:span><text:span text:style-name="a742" text:class-names=""><text:s text:c="1"/>1</text:span><text:span text:style-name="a743" text:class-names=""/></text:p>
          </draw:text-box>
          <svg:title/>
          <svg:desc/>
        </draw:frame>
        <presentation:notes draw:style-name="a751">
          <draw:page-thumbnail draw:page-number="1" svg:x="0.75in" svg:y="1.25in" svg:width="6in" svg:height="3.375in" presentation:class="page" draw:id="id73" presentation:style-name="a746" draw:name="Tijdelijke aanduiding voor dia-afbeelding 1">
            <svg:title/>
            <svg:desc/>
          </draw:page-thumbnail>
          <draw:frame draw:id="id74" presentation:style-name="a747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75" draw:style-name="a750" draw:name="Tijdelijke aanduiding voor dianummer 3" svg:x="4.24826in" svg:y="9.49826in" svg:width="3.25in" svg:height="0.50174in">
            <draw:text-box>
              <text:p text:style-name="a749" text:class-names="" text:cond-style-name=""><text:span text:style-name="a7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52" draw:master-page-name="Master1-Layout2-obj-Titel-en-object" presentation:presentation-page-layout-name="Master1-PPL2" draw:id="Slide-257">
        <draw:frame draw:id="id76" draw:style-name="a753" draw:name="Picture 2" svg:x="0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77" presentation:style-name="a756" draw:name="Titel 1" svg:x="0.91667in" svg:y="0.39931in" svg:width="4.01333in" svg:height="0.85243in" presentation:class="title" presentation:placeholder="false">
          <draw:text-box>
            <text:p text:style-name="a755" text:class-names="" text:cond-style-name=""><text:span text:style-name="a754" text:class-names="">Inhoud Meeting</text:span></text:p>
          </draw:text-box>
          <svg:title/>
          <svg:desc/>
        </draw:frame>
        <draw:frame draw:id="id78" presentation:style-name="a802" draw:name="Tijdelijke aanduiding voor inhoud 2" svg:x="0.91667in" svg:y="1.97653in" svg:width="5.29333in" svg:height="4.15347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Waar staan we nu</text:span></text:p>
              </text:list-item>
            </text:list>
            <text:list text:style-name="a763">
              <text:list-item>
                <text:p text:style-name="a762" text:class-names="" text:cond-style-name=""><text:span text:style-name="a760" text:class-names="">Terugblik</text:span><text:span text:style-name="a761" text:class-names="">:</text:span></text:p>
              </text:list-item>
            </text:list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4" text:class-names="">Wat ging er<text:s text:c="1"/></text:span><text:span text:style-name="a765" text:class-names="">goed</text:span><text:span text:style-name="a766" text:class-names=""/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69" text:class-names="">Waar l</text:span><text:span text:style-name="a770" text:class-names="">ie</text:span><text:span text:style-name="a771" text:class-names="">pen<text:s text:c="1"/></text:span><text:span text:style-name="a772" text:class-names="">we<text:s text:c="1"/></text:span><text:span text:style-name="a773" text:class-names="">tegen</text:span><text:span text:style-name="a774" text:class-names=""><text:s text:c="1"/>aan</text:span><text:span text:style-name="a775" text:class-names=""/></text:p>
                  </text:list-item>
                </text:list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Vooruitblik:</text:span></text:p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Wat gaan we doen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4" text:class-names="">Hoe gaan we dat<text:s text:c="1"/></text:span><text:span text:style-name="a785" text:class-names="">bereiken</text:span><text:span text:style-name="a786" text:class-names=""/></text:p>
                  </text:list-item>
                </text:list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Directe vragen</text:span></text:p>
              </text:list-item>
            </text:list>
            <text:list text:style-name="a795">
              <text:list-item>
                <text:p text:style-name="a794" text:class-names="" text:cond-style-name=""><text:span text:style-name="a792" text:class-names="">Feedback rondje</text:span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13" draw:style-name="a803" draw:master-page-name="Master1-Layout2-obj-Titel-en-object" presentation:presentation-page-layout-name="Master1-PPL2" draw:id="Slide-268">
        <draw:frame draw:id="id79" draw:style-name="a804" draw:name="Picture 2" svg:x="0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80" presentation:style-name="a808" draw:name="Titel 1" svg:x="0.91667in" svg:y="0.39931in" svg:width="5.19333in" svg:height="1.01069in" presentation:class="title" presentation:placeholder="false">
          <draw:text-box>
            <text:p text:style-name="a807" text:class-names="" text:cond-style-name=""><text:span text:style-name="a805" text:class-names="">Waar staan we nu?</text:span><text:span text:style-name="a806" text:class-names=""/></text:p>
          </draw:text-box>
          <svg:title/>
          <svg:desc/>
        </draw:frame>
        <draw:frame draw:id="id81" draw:style-name="a809" draw:name="Afbeelding 5" svg:x="0.41in" svg:y="4.12636in" svg:width="12.85333in" svg:height="2.03661in" style:rel-width="scale" style:rel-height="scale">
          <draw:image xlink:href="media/image2.png" xlink:type="simple" xlink:show="embed" xlink:actuate="onLoad"/>
          <svg:title/>
          <svg:desc/>
        </draw:frame>
        <draw:custom-shape svg:width="1.74in" svg:height="1.74in" draw:id="id83" draw:style-name="a812" draw:transform="translate(-0.87in -0.87in) rotate(-0.48368) translate(2.09146in 3.91825in)" draw:name="Pijl: omlaag 6">
          <svg:title/>
          <svg:desc/>
          <text:p text:style-name="a811" text:class-names="" text:cond-style-name="" text:id="id82"><text:span text:style-name="a81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1.74in" svg:height="1.74in" draw:id="id85" draw:style-name="a815" draw:transform="translate(-0.87in -0.87in) rotate(-0.48368) translate(10.24384in 3.91825in)" draw:name="Pijl: omlaag 7">
          <svg:title/>
          <svg:desc/>
          <text:p text:style-name="a814" text:class-names="" text:cond-style-name="" text:id="id84"><text:span text:style-name="a81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1.74in" svg:height="1.74in" draw:id="id87" draw:style-name="a818" draw:transform="translate(-0.87in -0.87in) rotate(-0.48368) translate(5.81918in 3.85927in)" draw:name="Pijl: omlaag 8">
          <svg:title/>
          <svg:desc/>
          <text:p text:style-name="a817" text:class-names="" text:cond-style-name="" text:id="id86"><text:span text:style-name="a81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</anim:seq>
        </anim:par>
        <presentation:notes draw:style-name="a824">
          <draw:page-thumbnail draw:page-number="3" svg:x="0.75in" svg:y="1.25in" svg:width="6in" svg:height="3.375in" presentation:class="page" draw:id="id88" presentation:style-name="a819" draw:name="Tijdelijke aanduiding voor dia-afbeelding 1">
            <svg:title/>
            <svg:desc/>
          </draw:page-thumbnail>
          <draw:frame draw:id="id89" presentation:style-name="a820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90" draw:style-name="a823" draw:name="Tijdelijke aanduiding voor dianummer 3" svg:x="4.24826in" svg:y="9.49826in" svg:width="3.25in" svg:height="0.50174in">
            <draw:text-box>
              <text:p text:style-name="a822" text:class-names="" text:cond-style-name=""><text:span text:style-name="a8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25" draw:master-page-name="Master1-Layout2-obj-Titel-en-object" presentation:presentation-page-layout-name="Master1-PPL2" draw:id="Slide-258">
        <draw:frame draw:id="id91" draw:style-name="a826" draw:name="Picture 2" svg:x="0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92" presentation:style-name="a831" draw:name="Titel 1" svg:x="0in" svg:y="0in" svg:width="3.27333in" svg:height="1.04069in" presentation:class="title" presentation:placeholder="false">
          <draw:text-box>
            <text:p text:style-name="a830" text:class-names="" text:cond-style-name=""><text:span text:style-name="a827" text:class-names="">Terugblik</text:span><text:span text:style-name="a828" text:class-names="">:</text:span><text:span text:style-name="a829" text:class-names=""/></text:p>
          </draw:text-box>
          <svg:title/>
          <svg:desc/>
        </draw:frame>
        <draw:frame draw:id="id93" presentation:style-name="a843" draw:name="Tijdelijke aanduiding voor inhoud 2" svg:x="0.12813in" svg:y="0.89309in" svg:width="3.44333in" svg:height="0.55104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32" text:class-names="">Wat</text:span><text:span text:style-name="a833" text:class-names=""><text:s text:c="1"/></text:span><text:span text:style-name="a834" text:class-names="">ging</text:span><text:span text:style-name="a835" text:class-names=""><text:s text:c="1"/></text:span><text:span text:style-name="a836" text:class-names="">er</text:span><text:span text:style-name="a837" text:class-names=""><text:s text:c="1"/></text:span><text:span text:style-name="a838" text:class-names="">goed</text:span><text:span text:style-name="a839" text:class-names="">?</text:span><text:span text:style-name="a840" text:class-names=""/></text:p>
              </text:list-item>
            </text:list>
          </draw:text-box>
          <svg:title/>
          <svg:desc/>
        </draw:frame>
        <draw:frame draw:id="id94" draw:style-name="a844" draw:name="Afbeelding 11" svg:x="4.51172in" svg:y="0.13074in" svg:width="4.3099in" svg:height="3.17722in" style:rel-width="scale" style:rel-height="scale">
          <draw:image xlink:href="media/image3.png" xlink:type="simple" xlink:show="embed" xlink:actuate="onLoad"/>
          <svg:title/>
          <svg:desc/>
        </draw:frame>
        <draw:frame draw:id="id95" draw:style-name="a845" draw:name="Afbeelding 13" svg:x="4.51172in" svg:y="3.30774in" svg:width="4.3099in" svg:height="2.45042in" style:rel-width="scale" style:rel-height="scale">
          <draw:image xlink:href="media/image4.png" xlink:type="simple" xlink:show="embed" xlink:actuate="onLoad"/>
          <svg:title/>
          <svg:desc/>
        </draw:frame>
        <draw:frame draw:id="id96" draw:style-name="a846" draw:name="Afbeelding 15" svg:x="9.07749in" svg:y="0.13074in" svg:width="4.16036in" svg:height="3.17722in" style:rel-width="scale" style:rel-height="scale">
          <draw:image xlink:href="media/image5.png" xlink:type="simple" xlink:show="embed" xlink:actuate="onLoad"/>
          <svg:title/>
          <svg:desc/>
        </draw:frame>
        <draw:frame draw:id="id97" draw:style-name="a847" draw:name="Afbeelding 17" svg:x="9.07104in" svg:y="3.30774in" svg:width="4.16681in" svg:height="3.00564in" style:rel-width="scale" style:rel-height="scale">
          <draw:image xlink:href="media/image6.png" xlink:type="simple" xlink:show="embed" xlink:actuate="onLoad"/>
          <svg:title/>
          <svg:desc/>
        </draw:frame>
        <draw:frame draw:id="id98" draw:style-name="a851" draw:name="Tekstvak 18" svg:x="0.80086in" svg:y="2.66822in" svg:width="2.91in" svg:height="0.63952in">
          <draw:text-box>
            <text:p text:style-name="a850" text:class-names="" text:cond-style-name=""><text:span text:style-name="a848" text:class-names="">Requirements</text:span><text:span text:style-name="a849" text:class-names=""/></text:p>
          </draw:text-box>
          <svg:title/>
          <svg:desc/>
        </draw:frame>
      </draw:page>
      <draw:page draw:name="Slide4" draw:style-name="a852" draw:master-page-name="Master1-Layout2-obj-Titel-en-object" presentation:presentation-page-layout-name="Master1-PPL2" draw:id="Slide-259">
        <draw:frame draw:id="id99" draw:style-name="a853" draw:name="Picture 2" svg:x="0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100" presentation:style-name="a858" draw:name="Titel 1" svg:x="0.67in" svg:y="3.29205in" svg:width="3.18333in" svg:height="0.9783in" presentation:class="title" presentation:placeholder="false">
          <draw:text-box>
            <text:p text:style-name="a857" text:class-names="" text:cond-style-name=""><text:span text:style-name="a854" text:class-names="">Key</text:span><text:span text:style-name="a855" text:class-names=""><text:s text:c="1"/>drivers</text:span><text:span text:style-name="a856" text:class-names=""/></text:p>
          </draw:text-box>
          <svg:title/>
          <svg:desc/>
        </draw:frame>
        <draw:frame draw:id="id101" draw:style-name="a862" draw:name="Titel 1" svg:x="0in" svg:y="0in" svg:width="3.27333in" svg:height="1.04069in">
          <draw:text-box>
            <text:p text:style-name="a861" text:class-names="" text:cond-style-name=""><text:span text:style-name="a859" text:class-names="">Terugblik:</text:span><text:span text:style-name="a860" text:class-names=""/></text:p>
          </draw:text-box>
          <svg:title/>
          <svg:desc/>
        </draw:frame>
        <draw:frame draw:id="id102" draw:style-name="a867" draw:name="Tijdelijke aanduiding voor inhoud 2" svg:x="0.12813in" svg:y="0.89309in" svg:width="3.44333in" svg:height="0.55104in">
          <draw:text-box>
            <text:list text:style-name="a866">
              <text:list-item>
                <text:p text:style-name="a865" text:class-names="" text:cond-style-name=""><text:span text:style-name="a863" text:class-names="">Wat ging er goed?</text:span><text:span text:style-name="a864" text:class-names=""/></text:p>
              </text:list-item>
            </text:list>
          </draw:text-box>
          <svg:title/>
          <svg:desc/>
        </draw:frame>
        <draw:frame draw:id="id103" draw:style-name="a868" draw:name="Afbeelding 11" svg:x="5.79916in" svg:y="0.47892in" svg:width="7.00942in" svg:height="5.6262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869" draw:master-page-name="Master1-Layout2-obj-Titel-en-object" presentation:presentation-page-layout-name="Master1-PPL2" draw:id="Slide-260">
        <draw:frame draw:id="id104" draw:style-name="a870" draw:name="Picture 2" svg:x="0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105" draw:style-name="a874" draw:name="Titel 1" svg:x="0in" svg:y="0in" svg:width="3.27333in" svg:height="1.04069in">
          <draw:text-box>
            <text:p text:style-name="a873" text:class-names="" text:cond-style-name=""><text:span text:style-name="a871" text:class-names="">Terugblik:</text:span><text:span text:style-name="a872" text:class-names=""/></text:p>
          </draw:text-box>
          <svg:title/>
          <svg:desc/>
        </draw:frame>
        <draw:frame draw:id="id106" draw:style-name="a879" draw:name="Tijdelijke aanduiding voor inhoud 2" svg:x="0.24813in" svg:y="0.86204in" svg:width="3.44333in" svg:height="0.55104in">
          <draw:text-box>
            <text:list text:style-name="a878">
              <text:list-item>
                <text:p text:style-name="a877" text:class-names="" text:cond-style-name=""><text:span text:style-name="a875" text:class-names="">Wat ging er goed?</text:span><text:span text:style-name="a876" text:class-names=""/></text:p>
              </text:list-item>
            </text:list>
          </draw:text-box>
          <svg:title/>
          <svg:desc/>
        </draw:frame>
        <draw:frame draw:id="id107" draw:style-name="a883" draw:name="Tekstvak 7" svg:x="0.1598in" svg:y="1.82in" svg:width="1.81in" svg:height="0.63952in">
          <draw:text-box>
            <text:p text:style-name="a882" text:class-names="" text:cond-style-name=""><text:span text:style-name="a880" text:class-names="">Gazebo</text:span><text:span text:style-name="a881" text:class-names=""/></text:p>
          </draw:text-box>
          <svg:title/>
          <svg:desc/>
        </draw:frame>
        <draw:frame draw:id="id108" draw:style-name="a884" draw:name="Picture 2" svg:x="4.26in" svg:y="0.12269in" svg:width="7.9602in" svg:height="2.01707in" style:rel-width="scale" style:rel-height="scale">
          <draw:image xlink:href="media/image8.png" xlink:type="simple" xlink:show="embed" xlink:actuate="onLoad"/>
          <svg:title/>
          <svg:desc/>
        </draw:frame>
        <draw:frame draw:id="id109" draw:style-name="a885" draw:name="Afbeelding 10" svg:x="5.91951in" svg:y="2.22108in" svg:width="6.3007in" svg:height="5.13068in" style:rel-width="scale" style:rel-height="scale">
          <draw:image xlink:href="media/image9.png" xlink:type="simple" xlink:show="embed" xlink:actuate="onLoad"/>
          <svg:title/>
          <svg:desc/>
        </draw:frame>
        <draw:frame draw:id="id110" draw:style-name="a886" draw:name="Afbeelding 12" svg:x="0.76384in" svg:y="3.81491in" svg:width="3.42582in" svg:height="3.36108in" style:rel-width="scale" style:rel-height="scale">
          <draw:image xlink:href="media/image10.png" xlink:type="simple" xlink:show="embed" xlink:actuate="onLoad"/>
          <svg:title/>
          <svg:desc/>
        </draw:frame>
        <draw:frame draw:id="id111" draw:style-name="a909" draw:name="Tekstvak 13" svg:x="2.25458in" svg:y="3.9153in" svg:width="1.90035in" svg:height="1.61563in">
          <draw:text-box>
            <text:list text:style-name="a889">
              <text:list-item>
                <text:p text:style-name="a888" text:class-names="" text:cond-style-name=""><text:span text:style-name="a887" text:class-names="">Erin &amp; Joni</text:span></text:p>
              </text:list-item>
            </text:list>
            <text:list text:style-name="a895">
              <text:list-item>
                <text:p text:style-name="a894" text:class-names="" text:cond-style-name=""><text:span text:style-name="a890" text:class-names="">Jente &amp;</text:span><text:span text:style-name="a891" text:class-names=""><text:s text:c="1"/></text:span><text:span text:style-name="a892" text:class-names="">Tim</text:span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Adriaan</text:span></text:p>
              </text:list-item>
            </text:list>
            <text:list text:style-name="a906">
              <text:list-item>
                <text:p text:style-name="a905" text:class-names="" text:cond-style-name=""><text:span text:style-name="a899" text:class-names="">3</text:span><text:span text:style-name="a900" text:class-names="">e</text:span><text:span text:style-name="a901" text:class-names=""><text:s text:c="1"/></text:span><text:span text:style-name="a902" text:class-names="">Segmen</text:span><text:span text:style-name="a903" text:class-names="">t</text:span><text:span text:style-name="a904" text:class-names=""/></text:p>
              </text:list-item>
            </text:list>
            <text:p text:style-name="a908" text:class-names="" text:cond-style-name=""><text:span text:style-name="a907" text:class-names=""/></text:p>
          </draw:text-box>
          <svg:title/>
          <svg:desc/>
        </draw:frame>
        <draw:custom-shape svg:width="0.3304in" svg:height="2.7481in" draw:id="id113" draw:style-name="a912" draw:transform="translate(-0.1652in -1.37405in) rotate(-5.44333) translate(6.55464in 2.53952in)" draw:name="Pijl: omlaag 16">
          <svg:title/>
          <svg:desc/>
          <text:p text:style-name="a911" text:class-names="" text:cond-style-name="" text:id="id112"><text:span text:style-name="a91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302 544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0.3304in" svg:height="2.63372in" draw:id="id115" draw:style-name="a915" draw:transform="translate(-0.1652in -1.31686in) rotate(-5.80938) translate(7.18578in 2.52936in)" draw:name="Pijl: omlaag 19">
          <svg:title/>
          <svg:desc/>
          <text:p text:style-name="a914" text:class-names="" text:cond-style-name="" text:id="id114"><text:span text:style-name="a91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245 544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0.3304in" svg:height="2.75667in" draw:id="id117" draw:style-name="a918" draw:transform="translate(-0.1652in -1.37833in) rotate(-0.27229) translate(8.18026in 2.91464in)" draw:name="Pijl: omlaag 22">
          <svg:title/>
          <svg:desc/>
          <text:p text:style-name="a917" text:class-names="" text:cond-style-name="" text:id="id116"><text:span text:style-name="a91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306 544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8.9482in" svg:y="0.86204in" svg:width="0.3304in" svg:height="5.12497in" draw:id="id119" draw:style-name="a921" draw:name="Pijl: omlaag 23">
          <svg:title/>
          <svg:desc/>
          <text:p text:style-name="a920" text:class-names="" text:cond-style-name="" text:id="id118"><text:span text:style-name="a919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904 544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9.41976in" svg:y="0.37048in" svg:width="0.3304in" svg:height="5.93952in" draw:id="id121" draw:style-name="a924" draw:name="Pijl: omlaag 24">
          <svg:title/>
          <svg:desc/>
          <text:p text:style-name="a923" text:class-names="" text:cond-style-name="" text:id="id120"><text:span text:style-name="a92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999 544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0.3304in" svg:height="5.28578in" draw:id="id123" draw:style-name="a927" draw:transform="translate(-0.1652in -2.64289in) rotate(-0.52097) translate(9.40734in 3.41519in)" draw:name="Pijl: omlaag 21">
          <svg:title/>
          <svg:desc/>
          <text:p text:style-name="a926" text:class-names="" text:cond-style-name="" text:id="id122"><text:span text:style-name="a92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925 544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0.3304in" svg:height="4.39006in" draw:id="id125" draw:style-name="a930" draw:transform="translate(-0.1652in -2.19503in) rotate(-0.56363) translate(9.00181in 3.25372in)" draw:name="Pijl: omlaag 20">
          <svg:title/>
          <svg:desc/>
          <text:p text:style-name="a929" text:class-names="" text:cond-style-name="" text:id="id124"><text:span text:style-name="a92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787 544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0.3304in" svg:height="2.42687in" draw:id="id127" draw:style-name="a933" draw:transform="translate(-0.1652in -1.21344in) rotate(-5.74078) translate(6.99766in 2.57396in)" draw:name="Pijl: omlaag 18">
          <svg:title/>
          <svg:desc/>
          <text:p text:style-name="a932" text:class-names="" text:cond-style-name="" text:id="id126"><text:span text:style-name="a93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130 544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15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repeatCount="1" smil:fill="hold">
                  <anim:set smil:targetElement="id12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27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3" smil:attributeName="visibility" smil:to="visible" smil:begin="0.0s" smil:dur="0.001s" smil:fill="hold"/>
                </anim:par>
              </anim:par>
            </anim:par>
          </anim:seq>
        </anim:par>
        <presentation:notes draw:style-name="a939">
          <draw:page-thumbnail draw:page-number="6" svg:x="0.75in" svg:y="1.25in" svg:width="6in" svg:height="3.375in" presentation:class="page" draw:id="id128" presentation:style-name="a934" draw:name="Tijdelijke aanduiding voor dia-afbeelding 1">
            <svg:title/>
            <svg:desc/>
          </draw:page-thumbnail>
          <draw:frame draw:id="id129" presentation:style-name="a935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938" draw:name="Tijdelijke aanduiding voor dianummer 3" svg:x="4.24826in" svg:y="9.49826in" svg:width="3.25in" svg:height="0.50174in">
            <draw:text-box>
              <text:p text:style-name="a937" text:class-names="" text:cond-style-name=""><text:span text:style-name="a9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40" draw:master-page-name="Master1-Layout2-obj-Titel-en-object" presentation:presentation-page-layout-name="Master1-PPL2" draw:id="Slide-264">
        <draw:frame draw:id="id131" draw:style-name="a941" draw:name="Picture 2" svg:x="-0.08019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132" draw:style-name="a945" draw:name="Titel 1" svg:x="0in" svg:y="0in" svg:width="3.27333in" svg:height="1.04069in">
          <draw:text-box>
            <text:p text:style-name="a944" text:class-names="" text:cond-style-name=""><text:span text:style-name="a942" text:class-names="">Terugblik:</text:span><text:span text:style-name="a943" text:class-names=""/></text:p>
          </draw:text-box>
          <svg:title/>
          <svg:desc/>
        </draw:frame>
        <draw:frame draw:id="id133" draw:style-name="a950" draw:name="Tijdelijke aanduiding voor inhoud 2" svg:x="0.24813in" svg:y="0.86204in" svg:width="3.44333in" svg:height="0.55104in">
          <draw:text-box>
            <text:list text:style-name="a949">
              <text:list-item>
                <text:p text:style-name="a948" text:class-names="" text:cond-style-name=""><text:span text:style-name="a946" text:class-names="">Wat ging er goed?</text:span><text:span text:style-name="a947" text:class-names=""/></text:p>
              </text:list-item>
            </text:list>
          </draw:text-box>
          <svg:title/>
          <svg:desc/>
        </draw:frame>
        <draw:frame draw:id="id134" draw:style-name="a951" draw:name="Afbeelding 7" svg:x="6.34968in" svg:y="0.07069in" svg:width="6.88439in" svg:height="4.18044in" style:rel-width="scale" style:rel-height="scale">
          <draw:image xlink:href="media/image11.png" xlink:type="simple" xlink:show="embed" xlink:actuate="onLoad"/>
          <svg:title/>
          <svg:desc/>
        </draw:frame>
        <draw:frame draw:id="id135" presentation:style-name="a955" draw:name="Titel 1" svg:x="0.09927in" svg:y="2.16091in" svg:width="2.36in" svg:height="0.9783in" presentation:class="title" presentation:placeholder="false">
          <draw:text-box>
            <text:p text:style-name="a954" text:class-names="" text:cond-style-name=""><text:span text:style-name="a952" text:class-names="">Houding</text:span><text:span text:style-name="a953" text:class-names=""/></text:p>
          </draw:text-box>
          <svg:title/>
          <svg:desc/>
        </draw:frame>
        <draw:frame draw:id="id136" draw:style-name="a956" draw:name="Picture 6" svg:x="1.32927in" svg:y="4.52016in" svg:width="4.29667in" svg:height="2.41688in" style:rel-width="scale" style:rel-height="scale">
          <draw:image xlink:href="media/image12.jpeg" xlink:type="simple" xlink:show="embed" xlink:actuate="onLoad"/>
          <svg:title/>
          <svg:desc>WhatsApp wants to prevent…</svg:desc>
        </draw:frame>
        <draw:frame draw:id="id137" draw:style-name="a957" draw:name="Afbeelding 10" svg:x="6.34968in" svg:y="4.32182in" svg:width="6.90224in" svg:height="2.83818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7" draw:style-name="a958" draw:master-page-name="Master1-Layout2-obj-Titel-en-object" presentation:presentation-page-layout-name="Master1-PPL2" draw:id="Slide-262">
        <draw:frame draw:id="id138" draw:style-name="a959" draw:name="Picture 2" svg:x="0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139" presentation:style-name="a963" draw:name="Titel 1" svg:x="0.16667in" svg:y="0.31858in" svg:width="3.71333in" svg:height="0.85243in" presentation:class="title" presentation:placeholder="false">
          <draw:text-box>
            <text:p text:style-name="a962" text:class-names="" text:cond-style-name=""><text:span text:style-name="a960" text:class-names="">Eindstand: 7-1<text:s text:c="1"/></text:span><text:span text:style-name="a961" text:class-names=""/></text:p>
          </draw:text-box>
          <svg:title/>
          <svg:desc/>
        </draw:frame>
        <draw:frame draw:id="id140" draw:style-name="a964" draw:name="Afbeelding 7" svg:x="1.90038in" svg:y="1.94246in" svg:width="9.53258in" svg:height="3.61509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6" draw:style-name="a965" draw:master-page-name="Master1-Layout2-obj-Titel-en-object" presentation:presentation-page-layout-name="Master1-PPL2" draw:id="Slide-261">
        <draw:frame draw:id="id141" draw:style-name="a966" draw:name="Picture 2" svg:x="0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142" draw:style-name="a970" draw:name="Titel 1" svg:x="0in" svg:y="0in" svg:width="3.27333in" svg:height="1.04069in">
          <draw:text-box>
            <text:p text:style-name="a969" text:class-names="" text:cond-style-name=""><text:span text:style-name="a967" text:class-names="">Terugblik:</text:span><text:span text:style-name="a968" text:class-names=""/></text:p>
          </draw:text-box>
          <svg:title/>
          <svg:desc/>
        </draw:frame>
        <draw:frame draw:id="id143" draw:style-name="a975" draw:name="Tijdelijke aanduiding voor inhoud 2" svg:x="0.20813in" svg:y="0.90671in" svg:width="4.98187in" svg:height="0.52329in">
          <draw:text-box>
            <text:list text:style-name="a974">
              <text:list-item>
                <text:p text:style-name="a973" text:class-names="" text:cond-style-name=""><text:span text:style-name="a971" text:class-names="">Waar liepen we tegen aan?</text:span><text:span text:style-name="a972" text:class-names=""/></text:p>
              </text:list-item>
            </text:list>
          </draw:text-box>
          <svg:title/>
          <svg:desc/>
        </draw:frame>
        <draw:frame draw:id="id144" draw:style-name="a980" draw:name="Tekstvak 11" svg:x="0.7in" svg:y="3.35538in" svg:width="2.21in" svg:height="0.50488in">
          <draw:text-box>
            <text:p text:style-name="a979" text:class-names="" text:cond-style-name=""><text:span text:style-name="a976" text:class-names="">Gazebo</text:span><text:span text:style-name="a977" text:class-names=""><text:s text:c="1"/>Joints</text:span><text:span text:style-name="a978" text:class-names=""/></text:p>
          </draw:text-box>
          <svg:title/>
          <svg:desc/>
        </draw:frame>
        <draw:frame draw:id="id145" draw:style-name="a981" draw:name="Afbeelding 12" svg:x="3.53in" svg:y="2.02912in" svg:width="9.543in" svg:height="0.81066in" style:rel-width="scale" style:rel-height="scale">
          <draw:image xlink:href="media/image15.png" xlink:type="simple" xlink:show="embed" xlink:actuate="onLoad"/>
          <svg:title/>
          <svg:desc/>
        </draw:frame>
        <draw:frame draw:id="id146" draw:style-name="a982" draw:name="Afbeelding 15" svg:x="0.29352in" svg:y="4.24957in" svg:width="4.62565in" svg:height="2.58369in" style:rel-width="scale" style:rel-height="scale">
          <draw:image xlink:href="media/image16.png" xlink:type="simple" xlink:show="embed" xlink:actuate="onLoad"/>
          <svg:title/>
          <svg:desc/>
        </draw:frame>
        <draw:frame draw:id="id147" draw:style-name="a983" draw:name="Afbeelding 18" svg:x="7.33273in" svg:y="3.27309in" svg:width="5.79247in" svg:height="3.6776in" style:rel-width="scale" style:rel-height="scale">
          <draw:image xlink:href="media/image17.png" xlink:type="simple" xlink:show="embed" xlink:actuate="onLoad"/>
          <svg:title/>
          <svg:desc/>
        </draw:frame>
        <draw:custom-shape svg:width="2.22811in" svg:height="2.21in" draw:id="id149" draw:style-name="a986" draw:transform="translate(-1.11406in -1.105in) rotate(-4.71239) translate(6.12594in 5.595in)" draw:name="Pijl: omlaag 19">
          <svg:title/>
          <svg:desc/>
          <text:p text:style-name="a985" text:class-names="" text:cond-style-name="" text:id="id148"><text:span text:style-name="a98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7.76953in" svg:y="4.68235in" svg:width="0.92948in" svg:height="0.85907in" draw:id="id151" draw:style-name="a989" draw:name="Ovaal 20">
          <svg:title/>
          <svg:desc/>
          <text:p text:style-name="a988" text:class-names="" text:cond-style-name="" text:id="id150"><text:span text:style-name="a9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8" draw:style-name="a990" draw:master-page-name="Master1-Layout2-obj-Titel-en-object" presentation:presentation-page-layout-name="Master1-PPL2" draw:id="Slide-263">
        <draw:frame draw:id="id152" draw:style-name="a991" draw:name="Picture 2" svg:x="0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153" draw:style-name="a995" draw:name="Titel 1" svg:x="0in" svg:y="0in" svg:width="3.27333in" svg:height="1.04069in">
          <draw:text-box>
            <text:p text:style-name="a994" text:class-names="" text:cond-style-name=""><text:span text:style-name="a992" text:class-names="">Vooruitblik:</text:span><text:span text:style-name="a993" text:class-names=""/></text:p>
          </draw:text-box>
          <svg:title/>
          <svg:desc/>
        </draw:frame>
        <draw:frame draw:id="id154" draw:style-name="a1000" draw:name="Tijdelijke aanduiding voor inhoud 2" svg:x="0.20813in" svg:y="0.90671in" svg:width="3.88187in" svg:height="0.52329in">
          <draw:text-box>
            <text:list text:style-name="a999">
              <text:list-item>
                <text:p text:style-name="a998" text:class-names="" text:cond-style-name=""><text:span text:style-name="a996" text:class-names="">Wat gaan we doen?</text:span><text:span text:style-name="a997" text:class-names=""/></text:p>
              </text:list-item>
            </text:list>
          </draw:text-box>
          <svg:title/>
          <svg:desc/>
        </draw:frame>
        <draw:frame draw:id="id155" draw:style-name="a1044" draw:name="Tekstvak 6" svg:x="5.78333in" svg:y="1.16836in" svg:width="6.44in" svg:height="1.91855in">
          <draw:text-box>
            <text:list text:style-name="a1017">
              <text:list-item>
                <text:p text:style-name="a1016" text:class-names="" text:cond-style-name=""><text:span text:style-name="a1001" text:class-names="">Verbinden</text:span><text:span text:style-name="a1002" text:class-names=""><text:s text:c="1"/></text:span><text:span text:style-name="a1003" text:class-names="">van</text:span><text:span text:style-name="a1004" text:class-names=""><text:s text:c="1"/></text:span><text:span text:style-name="a1005" text:class-names="">de</text:span><text:span text:style-name="a1006" text:class-names=""><text:s text:c="1"/></text:span><text:span text:style-name="a1007" text:class-names="">individuele</text:span><text:span text:style-name="a1008" text:class-names=""><text:s text:c="1"/></text:span><text:span text:style-name="a1009" text:class-names="">onderdelen</text:span><text:span text:style-name="a1010" text:class-names=""><text:s text:c="1"/></text:span><text:span text:style-name="a1011" text:class-names="">door</text:span><text:span text:style-name="a1012" text:class-names=""><text:s text:c="1"/></text:span><text:span text:style-name="a1013" text:class-names="">middel van<text:s text:c="1"/></text:span><text:span text:style-name="a1014" text:class-names="">j</text:span><text:span text:style-name="a1015" text:class-names="">oints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18" text:class-names="">Template<text:s text:c="1"/></text:span><text:span text:style-name="a1019" text:class-names="">voor het<text:s text:c="1"/></text:span><text:span text:style-name="a1020" text:class-names="">oriëntatieonderzoek opstellen</text:span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Het gebruiken van de branches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27" text:class-names="">Use</text:span><text:span text:style-name="a1028" text:class-names=""><text:s text:c="1"/></text:span><text:span text:style-name="a1029" text:class-names="">cases</text:span><text:span text:style-name="a1030" text:class-names=""><text:s text:c="1"/></text:span><text:span text:style-name="a1031" text:class-names="">opstellen</text:span><text:span text:style-name="a1032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35" text:class-names="">Gazebo-readme</text:span><text:span text:style-name="a1036" text:class-names=""><text:s text:c="1"/></text:span><text:span text:style-name="a1037" text:class-names="">voor<text:s text:c="1"/></text:span><text:span text:style-name="a1038" text:class-names="">de</text:span><text:span text:style-name="a1039" text:class-names=""><text:s text:c="1"/></text:span><text:span text:style-name="a1040" text:class-names="">opdrachtgever</text:span><text:span text:style-name="a1041" text:class-names=""/></text:p>
              </text:list-item>
            </text:list>
          </draw:text-box>
          <svg:title/>
          <svg:desc/>
        </draw:frame>
        <draw:frame draw:id="id156" draw:style-name="a1049" draw:name="Tijdelijke aanduiding voor inhoud 2" svg:x="5.50926in" svg:y="0.68745in" svg:width="2.4752in" svg:height="0.52329in">
          <draw:text-box>
            <text:list text:style-name="a1048">
              <text:list-item>
                <text:p text:style-name="a1047" text:class-names="" text:cond-style-name=""><text:span text:style-name="a1045" text:class-names="">Prestaties:</text:span><text:span text:style-name="a1046" text:class-names=""/></text:p>
              </text:list-item>
            </text:list>
          </draw:text-box>
          <svg:title/>
          <svg:desc/>
        </draw:frame>
        <draw:frame draw:id="id157" draw:style-name="a1050" draw:name="Afbeelding 17" svg:x="0.48in" svg:y="4.82636in" svg:width="12.85333in" svg:height="2.03661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.06667in" svg:y1="5.5in" svg:x2="2.77667in" svg:y2="5.5in" draw:id="id158" draw:style-name="a1051" draw:name="Rechte verbindingslijn 18">
          <svg:title/>
          <svg:desc/>
        </draw:connector>
        <draw:connector draw:type="line" svg:x1="5.03686in" svg:y1="5.5in" svg:x2="6.74686in" svg:y2="5.5in" draw:id="id159" draw:style-name="a1052" draw:name="Rechte verbindingslijn 19">
          <svg:title/>
          <svg:desc/>
        </draw:connector>
        <draw:connector draw:type="line" svg:x1="9.14667in" svg:y1="5.5in" svg:x2="10.85667in" svg:y2="5.5in" draw:id="id160" draw:style-name="a1053" draw:name="Rechte verbindingslijn 20">
          <svg:title/>
          <svg:desc/>
        </draw:connector>
      </draw:page>
      <draw:page draw:name="Slide10" draw:style-name="a1054" draw:master-page-name="Master1-Layout2-obj-Titel-en-object" presentation:presentation-page-layout-name="Master1-PPL2" draw:id="Slide-265">
        <draw:frame draw:id="id161" draw:style-name="a1055" draw:name="Picture 2" svg:x="0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162" draw:style-name="a1059" draw:name="Titel 1" svg:x="0in" svg:y="0in" svg:width="3.27333in" svg:height="1.04069in">
          <draw:text-box>
            <text:p text:style-name="a1058" text:class-names="" text:cond-style-name=""><text:span text:style-name="a1056" text:class-names="">Vooruitblik:</text:span><text:span text:style-name="a1057" text:class-names=""/></text:p>
          </draw:text-box>
          <svg:title/>
          <svg:desc/>
        </draw:frame>
        <draw:frame draw:id="id163" draw:style-name="a1068" draw:name="Tijdelijke aanduiding voor inhoud 2" svg:x="0.26572in" svg:y="0.88671in" svg:width="5.41187in" svg:height="0.59329in">
          <draw:text-box>
            <text:list text:style-name="a1067">
              <text:list-item>
                <text:p text:style-name="a1066" text:class-names="" text:cond-style-name=""><text:span text:style-name="a1060" text:class-names="">Hoe</text:span><text:span text:style-name="a1061" text:class-names=""><text:s text:c="1"/></text:span><text:span text:style-name="a1062" text:class-names="">gaan</text:span><text:span text:style-name="a1063" text:class-names=""><text:s text:c="1"/></text:span><text:span text:style-name="a1064" text:class-names="">we dat bereiken?</text:span><text:span text:style-name="a1065" text:class-names=""/></text:p>
              </text:list-item>
            </text:list>
          </draw:text-box>
          <svg:title/>
          <svg:desc/>
        </draw:frame>
        <draw:frame draw:id="id164" draw:style-name="a1089" draw:name="Tekstvak 9" svg:x="8.15166in" svg:y="3.39682in" svg:width="3.06834in" svg:height="2.22148in">
          <draw:text-box>
            <text:list text:style-name="a1073">
              <text:list-item>
                <text:p text:style-name="a1072" text:class-names="" text:cond-style-name=""><text:span text:style-name="a1069" text:class-names="">Vroegtijdig met<text:s text:c="1"/></text:span><text:span text:style-name="a1070" text:class-names="">Gazebo</text:span><text:span text:style-name="a1071" text:class-names=""><text:s text:c="1"/>beginnen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4" text:class-names="">Aanscherpen<text:s text:c="1"/></text:span><text:span text:style-name="a1075" text:class-names="">daily-stanup</text:span><text:span text:style-name="a1076" text:class-names=""><text:s text:c="1"/>(SM)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Actueel bijhouden van de planning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2" text:class-names="">Helder</text:span><text:span text:style-name="a1083" text:class-names=""><text:s text:c="1"/></text:span><text:span text:style-name="a1084" text:class-names="">documenteren</text:span><text:span text:style-name="a1085" text:class-names=""><text:s text:c="1"/></text:span><text:span text:style-name="a1086" text:class-names=""/></text:p>
              </text:list-item>
            </text:list>
          </draw:text-box>
          <svg:title/>
          <svg:desc/>
        </draw:frame>
        <draw:frame draw:id="id165" draw:style-name="a1093" draw:name="Tekstvak 8" svg:x="7.27759in" svg:y="2.74in" svg:width="3.68241in" svg:height="0.70684in">
          <draw:text-box>
            <text:p text:style-name="a1092" text:class-names="" text:cond-style-name=""><text:span text:style-name="a1090" text:class-names="">Beter plannen!!!</text:span><text:span text:style-name="a1091" text:class-names=""/></text:p>
          </draw:text-box>
          <svg:title/>
          <svg:desc/>
        </draw:frame>
      </draw:page>
      <draw:page draw:name="Slide11" draw:style-name="a1094" draw:master-page-name="Master1-Layout2-obj-Titel-en-object" presentation:presentation-page-layout-name="Master1-PPL2" draw:id="Slide-266">
        <draw:frame draw:id="id166" draw:style-name="a1095" draw:name="Picture 2" svg:x="0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167" presentation:style-name="a1099" draw:name="Titel 1" svg:x="0.33667in" svg:y="0.47292in" svg:width="3.91333in" svg:height="1.05069in" presentation:class="title" presentation:placeholder="false">
          <draw:text-box>
            <text:p text:style-name="a1098" text:class-names="" text:cond-style-name=""><text:span text:style-name="a1096" text:class-names="">Directe vragen</text:span><text:span text:style-name="a1097" text:class-names=""/></text:p>
          </draw:text-box>
          <svg:title/>
          <svg:desc/>
        </draw:frame>
        <draw:frame draw:id="id168" presentation:style-name="a1100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2" draw:style-name="a1101" draw:master-page-name="Master1-Layout2-obj-Titel-en-object" presentation:presentation-page-layout-name="Master1-PPL2" draw:id="Slide-267">
        <draw:frame draw:id="id169" draw:style-name="a1102" draw:name="Picture 2" svg:x="0in" svg:y="0in" svg:width="13.49372in" svg:height="7.5in" style:rel-width="scale" style:rel-height="scale">
          <draw:image xlink:href="media/image1.jpeg" xlink:type="simple" xlink:show="embed" xlink:actuate="onLoad"/>
          <svg:title/>
          <svg:desc>De narwal</svg:desc>
        </draw:frame>
        <draw:frame draw:id="id170" presentation:style-name="a1106" draw:name="Titel 1" svg:x="0.91667in" svg:y="0.39931in" svg:width="4.37333in" svg:height="1.17069in" presentation:class="title" presentation:placeholder="false">
          <draw:text-box>
            <text:p text:style-name="a1105" text:class-names="" text:cond-style-name=""><text:span text:style-name="a1103" text:class-names="">Feedback rondje</text:span><text:span text:style-name="a1104" text:class-names=""/></text:p>
          </draw:text-box>
          <svg:title/>
          <svg:desc/>
        </draw:frame>
        <draw:frame draw:id="id171" draw:style-name="a1117" draw:name="Tekstvak 4" svg:x="1.79in" svg:y="3.19816in" svg:width="2.92in" svg:height="0.70684in">
          <draw:text-box>
            <text:list text:style-name="a1109">
              <text:list-item>
                <text:p text:style-name="a1108" text:class-names="" text:cond-style-name=""><text:span text:style-name="a1107" text:class-names="">Presentatie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0" text:class-names="">Gemaakte</text:span><text:span text:style-name="a1111" text:class-names=""><text:s text:c="1"/></text:span><text:span text:style-name="a1112" text:class-names="">onderdele</text:span><text:span text:style-name="a1113" text:class-names="">n</text:span><text:span text:style-name="a11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3" draw:name="Tijdelijke aanduiding voor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om stijl te bewerken</text:span></text:p>
        </draw:text-box>
        <svg:title/>
        <svg:desc/>
      </draw:frame>
      <draw:frame draw:id="id1" presentation:style-name="a19" draw:name="Tijdelijke aanduiding vo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-3-2026</text:date></text:span></text:p>
        </draw:text-box>
        <svg:title/>
        <svg:desc/>
      </draw:frame>
      <draw:frame draw:id="id3" presentation:style-name="a26" draw:name="Tijdelijke aanduiding voor voet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Tijdelijke aanduiding voor koptekst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Tijdelijke aanduiding voor datum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Tijdelijke aanduiding voor dia-afbeelding 3">
          <svg:title/>
          <svg:desc/>
        </draw:page-thumbnail>
        <draw:frame draw:id="id8" presentation:style-name="a54" draw:name="Tijdelijke aanduiding voor notitie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Klikken om de tekststijl van het model te bewerk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Tweede niveau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Vijfde niveau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Tijdelijke aanduiding voor voettekst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Tijdelijke aanduiding voor dianumm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3">
      <draw:frame draw:id="id11" presentation:style-name="a66" draw:name="Titel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Klik om stijl te bewerken</text:span></text:p>
        </draw:text-box>
        <svg:title/>
        <svg:desc/>
      </draw:frame>
      <draw:frame draw:id="id12" presentation:style-name="a69" draw:name="Ondertitel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Klikken om de ondertitelstijl van het model te bewerken</text:span></text:p>
        </draw:text-box>
        <svg:title/>
        <svg:desc/>
      </draw:frame>
      <draw:frame draw:id="id13" presentation:style-name="a73" draw:name="Tijdelijke aanduiding voor datum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5-3-2026</text:date></text:span></text:p>
        </draw:text-box>
        <svg:title/>
        <svg:desc/>
      </draw:frame>
      <draw:frame draw:id="id14" presentation:style-name="a76" draw:name="Tijdelijke aanduiding voor voettekst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Tijdelijke aanduiding voor dianumm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Tijdelijke aanduiding voor koptekst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Tijdelijke aanduiding voor datum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Tijdelijke aanduiding voor dia-afbeelding 3">
          <svg:title/>
          <svg:desc/>
        </draw:page-thumbnail>
        <draw:frame draw:id="id8" presentation:style-name="a104" draw:name="Tijdelijke aanduiding voor notitie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Klikken om de tekststijl van het model te bewerk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Tweed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Vijfde niveau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Tijdelijke aanduiding voor voettekst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Tijdelijke aanduiding voor dianumm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3">
      <draw:frame draw:id="id16" presentation:style-name="a116" draw:name="Titel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Klik om stijl te bewerken</text:span></text:p>
        </draw:text-box>
        <svg:title/>
        <svg:desc/>
      </draw:frame>
      <draw:frame draw:id="id17" presentation:style-name="a132" draw:name="Tijdelijke aanduiding voor inhoud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Klikken om de tekststijl van het model te bewerken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Tweede niveau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Tijdelijke aanduiding voor datum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25-3-2026</text:date></text:span></text:p>
        </draw:text-box>
        <svg:title/>
        <svg:desc/>
      </draw:frame>
      <draw:frame draw:id="id19" presentation:style-name="a139" draw:name="Tijdelijke aanduiding voor voettekst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Tijdelijke aanduiding voor dianumm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Tijdelijke aanduiding voor koptekst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Tijdelijke aanduiding voor datum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Tijdelijke aanduiding voor dia-afbeelding 3">
          <svg:title/>
          <svg:desc/>
        </draw:page-thumbnail>
        <draw:frame draw:id="id8" presentation:style-name="a167" draw:name="Tijdelijke aanduiding voor notities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Klikken om de tekststijl van het model te bewerken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Tweede niveau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Vijfde niveau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Tijdelijke aanduiding voor voettekst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Tijdelijke aanduiding voor dianumm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76">
      <draw:frame draw:id="id21" presentation:style-name="a179" draw:name="Titel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Klik om stijl te bewerken</text:span></text:p>
        </draw:text-box>
        <svg:title/>
        <svg:desc/>
      </draw:frame>
      <draw:frame draw:id="id22" presentation:style-name="a183" draw:name="Tijdelijke aanduiding voor tekst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Klikken om de tekststijl van het model te bewerken</text:span></text:p>
            </text:list-item>
          </text:list>
        </draw:text-box>
        <svg:title/>
        <svg:desc/>
      </draw:frame>
      <draw:frame draw:id="id23" presentation:style-name="a187" draw:name="Tijdelijke aanduiding voor datum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25-3-2026</text:date></text:span></text:p>
        </draw:text-box>
        <svg:title/>
        <svg:desc/>
      </draw:frame>
      <draw:frame draw:id="id24" presentation:style-name="a190" draw:name="Tijdelijke aanduiding voor voettekst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Tijdelijke aanduiding voor dianummer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Tijdelijke aanduiding voor koptekst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Tijdelijke aanduiding voor datum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Tijdelijke aanduiding voor dia-afbeelding 3">
          <svg:title/>
          <svg:desc/>
        </draw:page-thumbnail>
        <draw:frame draw:id="id8" presentation:style-name="a218" draw:name="Tijdelijke aanduiding voor notiti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Klikken om de tekststijl van het model te bewerk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Tweed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Vijfd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Tijdelijke aanduiding voor voettekst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Tijdelijke aanduiding voor dianummer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27">
      <draw:frame draw:id="id26" presentation:style-name="a230" draw:name="Ti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Klik om stijl te bewerken</text:span></text:p>
        </draw:text-box>
        <svg:title/>
        <svg:desc/>
      </draw:frame>
      <draw:frame draw:id="id27" presentation:style-name="a246" draw:name="Tijdelijke aanduiding voor inhoud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Klikken om de tekststijl van het model te bewerk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Tweed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Tijdelijke aanduiding voor inhoud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Klikken om de tekststijl van het model te bewerk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Tweed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Tijdelijke aanduiding voor datum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25-3-2026</text:date></text:span></text:p>
        </draw:text-box>
        <svg:title/>
        <svg:desc/>
      </draw:frame>
      <draw:frame draw:id="id30" presentation:style-name="a269" draw:name="Tijdelijke aanduiding voor voettekst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Tijdelijke aanduiding voor dianummer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Tijdelijke aanduiding voor koptekst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Tijdelijke aanduiding voor datum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Tijdelijke aanduiding voor dia-afbeelding 3">
          <svg:title/>
          <svg:desc/>
        </draw:page-thumbnail>
        <draw:frame draw:id="id8" presentation:style-name="a297" draw:name="Tijdelijke aanduiding voor notities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Klikken om de tekststijl van het model te bewerken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Tweede niveau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Vijfde niveau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Tijdelijke aanduiding voor voettekst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Tijdelijke aanduiding voor dianumm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06">
      <draw:frame draw:id="id32" presentation:style-name="a309" draw:name="Titel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Klik om stijl te bewerken</text:span></text:p>
        </draw:text-box>
        <svg:title/>
        <svg:desc/>
      </draw:frame>
      <draw:frame draw:id="id33" presentation:style-name="a313" draw:name="Tijdelijke aanduiding voor tekst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329" draw:name="Tijdelijke aanduiding voor inhoud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Klikken om de tekststijl van het model te bewerken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Tweede niveau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Tijdelijke aanduiding voor tekst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Klikken om de tekststijl van het model te bewerken</text:span></text:p>
            </text:list-item>
          </text:list>
        </draw:text-box>
        <svg:title/>
        <svg:desc/>
      </draw:frame>
      <draw:frame draw:id="id36" presentation:style-name="a349" draw:name="Tijdelijke aanduiding voor inhoud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Klikken om de tekststijl van het model te bewerken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Tweede niveau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Tijdelijke aanduiding voor datum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25-3-2026</text:date></text:span></text:p>
        </draw:text-box>
        <svg:title/>
        <svg:desc/>
      </draw:frame>
      <draw:frame draw:id="id38" presentation:style-name="a356" draw:name="Tijdelijke aanduiding voor voettekst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Tijdelijke aanduiding voor dianummer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Tijdelijke aanduiding voor koptekst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Tijdelijke aanduiding voor datum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Tijdelijke aanduiding voor dia-afbeelding 3">
          <svg:title/>
          <svg:desc/>
        </draw:page-thumbnail>
        <draw:frame draw:id="id8" presentation:style-name="a384" draw:name="Tijdelijke aanduiding voor notities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Klikken om de tekststijl van het model te bewerken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Tweede niveau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Vijfde niveau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Tijdelijke aanduiding voor voettekst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Tijdelijke aanduiding voor dianumm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393">
      <draw:frame draw:id="id40" presentation:style-name="a396" draw:name="Titel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Klik om stijl te bewerken</text:span></text:p>
        </draw:text-box>
        <svg:title/>
        <svg:desc/>
      </draw:frame>
      <draw:frame draw:id="id41" presentation:style-name="a400" draw:name="Tijdelijke aanduiding voor datum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25-3-2026</text:date></text:span></text:p>
        </draw:text-box>
        <svg:title/>
        <svg:desc/>
      </draw:frame>
      <draw:frame draw:id="id42" presentation:style-name="a403" draw:name="Tijdelijke aanduiding voor voettekst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Tijdelijke aanduiding voor dianummer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Tijdelijke aanduiding voor koptekst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Tijdelijke aanduiding voor datum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Tijdelijke aanduiding voor dia-afbeelding 3">
          <svg:title/>
          <svg:desc/>
        </draw:page-thumbnail>
        <draw:frame draw:id="id8" presentation:style-name="a431" draw:name="Tijdelijke aanduiding voor notities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Klikken om de tekststijl van het model te bewerken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Tweede niveau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Vijfde niveau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Tijdelijke aanduiding voor voettekst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Tijdelijke aanduiding voor dianumm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440">
      <draw:frame draw:id="id44" presentation:style-name="a444" draw:name="Tijdelijke aanduiding voor datum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5-3-2026</text:date></text:span></text:p>
        </draw:text-box>
        <svg:title/>
        <svg:desc/>
      </draw:frame>
      <draw:frame draw:id="id45" presentation:style-name="a447" draw:name="Tijdelijke aanduiding voor voettekst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Tijdelijke aanduiding voor dianumm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Tijdelijke aanduiding voor koptekst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Tijdelijke aanduiding voor datum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Tijdelijke aanduiding voor dia-afbeelding 3">
          <svg:title/>
          <svg:desc/>
        </draw:page-thumbnail>
        <draw:frame draw:id="id8" presentation:style-name="a475" draw:name="Tijdelijke aanduiding voor notitie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Klikken om de tekststijl van het model te bewerken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Tweede niveau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Vijfde niveau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Tijdelijke aanduiding voor voettekst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Tijdelijke aanduiding voor dianumm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484">
      <draw:frame draw:id="id47" presentation:style-name="a487" draw:name="Titel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Klik om stijl te bewerken</text:span></text:p>
        </draw:text-box>
        <svg:title/>
        <svg:desc/>
      </draw:frame>
      <draw:frame draw:id="id48" presentation:style-name="a503" draw:name="Tijdelijke aanduiding voor inhoud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Klikken om de tekststijl van het model te bewerke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Tweede niveau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Derde niveau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ijdelijke aanduiding voor tekst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511" draw:name="Tijdelijke aanduiding voor datum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5-3-2026</text:date></text:span></text:p>
        </draw:text-box>
        <svg:title/>
        <svg:desc/>
      </draw:frame>
      <draw:frame draw:id="id51" presentation:style-name="a514" draw:name="Tijdelijke aanduiding voor voettekst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Tijdelijke aanduiding voor dianumm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Tijdelijke aanduiding voor koptekst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Tijdelijke aanduiding voor datum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Tijdelijke aanduiding voor dia-afbeelding 3">
          <svg:title/>
          <svg:desc/>
        </draw:page-thumbnail>
        <draw:frame draw:id="id8" presentation:style-name="a542" draw:name="Tijdelijke aanduiding voor notities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Klikken om de tekststijl van het model te bewerken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Tweede niveau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Vijfde niveau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Tijdelijke aanduiding voor voettekst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Tijdelijke aanduiding voor dianumm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51">
      <draw:frame draw:id="id53" presentation:style-name="a554" draw:name="Titel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Klik om stijl te bewerken</text:span></text:p>
        </draw:text-box>
        <svg:title/>
        <svg:desc/>
      </draw:frame>
      <draw:frame draw:id="id54" presentation:style-name="a557" draw:name="Tijdelijke aanduiding voor afbeelding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Tijdelijke aanduiding voor tekst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565" draw:name="Tijdelijke aanduiding voor datum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25-3-2026</text:date></text:span></text:p>
        </draw:text-box>
        <svg:title/>
        <svg:desc/>
      </draw:frame>
      <draw:frame draw:id="id57" presentation:style-name="a568" draw:name="Tijdelijke aanduiding voor voettekst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Tijdelijke aanduiding voor dianummer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Tijdelijke aanduiding voor koptekst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Tijdelijke aanduiding voor datum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Tijdelijke aanduiding voor dia-afbeelding 3">
          <svg:title/>
          <svg:desc/>
        </draw:page-thumbnail>
        <draw:frame draw:id="id8" presentation:style-name="a596" draw:name="Tijdelijke aanduiding voor notities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Klikken om de tekststijl van het model te bewerken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Tweede niveau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Vijfde niveau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Tijdelijke aanduiding voor voettekst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Tijdelijke aanduiding voor dianumm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05">
      <draw:frame draw:id="id59" presentation:style-name="a608" draw:name="Titel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Klik om stijl te bewerken</text:span></text:p>
        </draw:text-box>
        <svg:title/>
        <svg:desc/>
      </draw:frame>
      <draw:frame draw:id="id60" presentation:style-name="a624" draw:name="Tijdelijke aanduiding voor verticale tekst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Klikken om de tekststijl van het model te bewerke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Tweede niveau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Tijdelijke aanduiding voor datum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25-3-2026</text:date></text:span></text:p>
        </draw:text-box>
        <svg:title/>
        <svg:desc/>
      </draw:frame>
      <draw:frame draw:id="id62" presentation:style-name="a631" draw:name="Tijdelijke aanduiding voor voettekst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Tijdelijke aanduiding voor dianummer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Tijdelijke aanduiding voor koptekst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Tijdelijke aanduiding voor datum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Tijdelijke aanduiding voor dia-afbeelding 3">
          <svg:title/>
          <svg:desc/>
        </draw:page-thumbnail>
        <draw:frame draw:id="id8" presentation:style-name="a659" draw:name="Tijdelijke aanduiding voor notities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Klikken om de tekststijl van het model te bewerken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Tweede niveau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Vijfde niveau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Tijdelijke aanduiding voor voettekst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Tijdelijke aanduiding voor dianumm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668">
      <draw:frame draw:id="id64" presentation:style-name="a671" draw:name="Verticale titel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Klik om stijl te bewerken</text:span></text:p>
        </draw:text-box>
        <svg:title/>
        <svg:desc/>
      </draw:frame>
      <draw:frame draw:id="id65" presentation:style-name="a687" draw:name="Tijdelijke aanduiding voor verticale tekst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Klikken om de tekststijl van het model te bewerken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Tweede niveau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Derde niveau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Tijdelijke aanduiding voor datum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25-3-2026</text:date></text:span></text:p>
        </draw:text-box>
        <svg:title/>
        <svg:desc/>
      </draw:frame>
      <draw:frame draw:id="id67" presentation:style-name="a694" draw:name="Tijdelijke aanduiding voor voettekst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Tijdelijke aanduiding voor dianummer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Tijdelijke aanduiding voor koptekst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Tijdelijke aanduiding voor datum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Tijdelijke aanduiding voor dia-afbeelding 3">
          <svg:title/>
          <svg:desc/>
        </draw:page-thumbnail>
        <draw:frame draw:id="id8" presentation:style-name="a722" draw:name="Tijdelijke aanduiding voor notitie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Klikken om de tekststijl van het model te bewerken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Tweede nivea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Vijfde niveau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Tijdelijke aanduiding voor voettekst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Tijdelijke aanduiding voor dianummer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oni Klumpenaar</meta:initial-creator>
    <dc:creator>Joni Klumpenaar</dc:creator>
    <meta:creation-date>2026-03-24T11:08:30Z</meta:creation-date>
    <dc:date>2026-03-25T11:57:07Z</dc:date>
    <meta:editing-cycles>7</meta:editing-cycles>
    <meta:editing-duration>PT88867S</meta:editing-duration>
    <meta:document-statistic meta:paragraph-count="56" meta:word-count="170"/>
  </office:meta>
</office:document-meta>
</file>