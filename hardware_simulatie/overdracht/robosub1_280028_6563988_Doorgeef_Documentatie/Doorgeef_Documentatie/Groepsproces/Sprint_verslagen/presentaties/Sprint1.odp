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none" draw:stroke="solid" svg:stroke-width="0.08333in" svg:stroke-color="#ff0000" draw:marker-end="a510" svg:stroke-opacity="100%" draw:stroke-linejoin="miter" svg:stroke-linecap="butt"/>
    </style:style>
    <style:style style:family="graphic" style:name="a513">
      <style:graphic-properties draw:fill="none" draw:stroke="solid" svg:stroke-width="0.08333in" svg:stroke-color="#ff0000" draw:marker-end="a512" svg:stroke-opacity="100%" draw:stroke-linejoin="miter" svg:stroke-linecap="butt"/>
    </style:style>
    <style:style style:family="graphic" style:name="a515">
      <style:graphic-properties draw:fill="none" draw:stroke="solid" svg:stroke-width="0.08333in" svg:stroke-color="#ff0000" draw:marker-end="a514" svg:stroke-opacity="100%" draw:stroke-linejoin="miter" svg:stroke-linecap="butt"/>
    </style:style>
    <style:style style:family="graphic" style:name="a517">
      <style:graphic-properties draw:fill="none" draw:stroke="solid" svg:stroke-width="0.08333in" svg:stroke-color="#ff0000" draw:marker-end="a516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draw:fill="none" draw:stroke="solid" svg:stroke-width="0.08333in" svg:stroke-color="#ff0000" draw:marker-end="a518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none" fo:clip="rect(0in, 0in, 0in, 0in)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fo:clip="rect(0in, 0in, 0in, 0in)" draw:stroke="non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09">
      <style:graphic-properties draw:fill="none" draw:stroke="solid" svg:stroke-width="0.08333in" svg:stroke-color="#ff0000" draw:marker-end="a508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2-obj-Titel-en-object" presentation:presentation-page-layout-name="Master1-PPL2" draw:id="Slide-260">
        <draw:frame draw:id="id63" presentation:style-name="a336" draw:name="Picture 2" svg:x="0in" svg:y="0in" svg:width="13.49372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De narwal</svg:desc>
        </draw:frame>
        <draw:frame draw:id="id64" presentation:style-name="a339" draw:name="Titel 1" svg:x="0.91667in" svg:y="0.39931in" svg:width="3.58333in" svg:height="1.44965in" presentation:class="title" presentation:placeholder="false">
          <draw:text-box>
            <text:p text:style-name="a338" text:class-names="" text:cond-style-name=""><text:span text:style-name="a337" text:class-names="">Team Narwal</text:span></text:p>
          </draw:text-box>
          <svg:title/>
          <svg:desc/>
        </draw:frame>
      </draw:page>
      <draw:page draw:name="Slide4" draw:style-name="a340" draw:master-page-name="Master1-Layout2-obj-Titel-en-object" presentation:presentation-page-layout-name="Master1-PPL2" draw:id="Slide-259">
        <draw:frame draw:id="id65" presentation:style-name="a343" draw:name="Titel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Robosub</text:span></text:p>
          </draw:text-box>
          <svg:title/>
          <svg:desc/>
        </draw:frame>
        <draw:frame draw:id="id66" presentation:style-name="a344" draw:name="Picture 2" svg:x="5.86406in" svg:y="0.31612in" svg:width="5.01256in" svg:height="3.98264in" style:rel-width="scale" style:rel-height="scale" presentation:class="graphic" presentation:placeholder="false">
          <draw:image xlink:href="media/image2.png" xlink:type="simple" xlink:show="embed" xlink:actuate="onLoad"/>
          <svg:title/>
          <svg:desc>Afbeelding met speelgoed, transport, ruimtevaartuig

Door AI gegenereerde inhoud is mogelijk onjuist.</svg:desc>
        </draw:frame>
        <draw:frame draw:id="id67" draw:style-name="a347" draw:name="Tekstvak 3" svg:x="1.12in" svg:y="2.53541in" svg:width="2.67in" svg:height="0.70684in">
          <draw:text-box>
            <text:p text:style-name="a346" text:class-names="" text:cond-style-name=""><text:span text:style-name="a345" text:class-names="">Wat moeten we gaan doen?</text:span></text:p>
          </draw:text-box>
          <svg:title/>
          <svg:desc/>
        </draw:frame>
        <draw:custom-shape svg:x="2.76in" svg:y="4.04483in" svg:width="2.06in" svg:height="2.07in" draw:id="id68" draw:style-name="a350" draw:name="Ovaal 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167in" svg:y="4.1565in" svg:width="1.81667in" svg:height="1.84667in" draw:id="id69" draw:style-name="a353" draw:name="Ovaal 6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167in" svg:y="5.05483in" svg:width="1.81667in" svg:height="0.09in" draw:id="id70" draw:style-name="a356" draw:name="Rechthoek 7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87165in" svg:height="0.60483in" draw:id="id71" draw:style-name="a359" draw:transform="translate(-0.43582in -0.30241in) rotate(-5.29923) translate(3.77286in 4.75476in)" draw:name="Boog 15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81, -267, -254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91"/>
            <draw:equation draw:name="f15" draw:formula="344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3 / 2"/>
            <draw:equation draw:name="f36" draw:formula="?f34 / 2"/>
            <draw:equation draw:name="f37" draw:formula="?f32 - ?f31"/>
            <draw:equation draw:name="f38" draw:formula="?f31 + ?f2"/>
            <draw:equation draw:name="f39" draw:formula="?f32 + ?f2"/>
            <draw:equation draw:name="f40" draw:formula="21600000 - ?f31"/>
            <draw:equation draw:name="f41" draw:formula="?f2 - ?f31"/>
            <draw:equation draw:name="f42" draw:formula="27000000 - ?f31"/>
            <draw:equation draw:name="f43" draw:formula="?f1 - ?f31"/>
            <draw:equation draw:name="f44" draw:formula="32400000 - ?f31"/>
            <draw:equation draw:name="f45" draw:formula="?f0 - ?f31"/>
            <draw:equation draw:name="f46" draw:formula="37800000 - ?f31"/>
            <draw:equation draw:name="f47" draw:formula="?f12 + ?f35"/>
            <draw:equation draw:name="f48" draw:formula="?f12 + ?f36"/>
            <draw:equation draw:name="f49" draw:formula="?f37 + 21600000"/>
            <draw:equation draw:name="f50" draw:formula="if(?f41, ?f41, ?f42)"/>
            <draw:equation draw:name="f51" draw:formula="if(?f43, ?f43, ?f44)"/>
            <draw:equation draw:name="f52" draw:formula="if(?f45, ?f45, ?f46)"/>
            <draw:equation draw:name="f53" draw:formula="?f36 * ?f26"/>
            <draw:equation draw:name="f54" draw:formula="?f35 * ?f26"/>
            <draw:equation draw:name="f55" draw:formula="if(?f37, ?f37, ?f49)"/>
            <draw:equation draw:name="f56" draw:formula="?f55 - ?f40"/>
            <draw:equation draw:name="f57" draw:formula="?f55 - ?f50"/>
            <draw:equation draw:name="f58" draw:formula="?f55 - ?f51"/>
            <draw:equation draw:name="f59" draw:formula="?f55 - ?f52"/>
            <draw:equation draw:name="f60" draw:formula="?f38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9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36"/>
            <draw:equation draw:name="f77" draw:formula="?f67 * ?f35"/>
            <draw:equation draw:name="f78" draw:formula="?f72 * ?f36"/>
            <draw:equation draw:name="f79" draw:formula="?f75 * ?f3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36"/>
            <draw:equation draw:name="f119" draw:formula="?f115 * ?f35"/>
            <draw:equation draw:name="f120" draw:formula="?f116 * ?f36"/>
            <draw:equation draw:name="f121" draw:formula="?f117 * ?f35"/>
            <draw:equation draw:name="f122" draw:formula="?f48 + ?f118"/>
            <draw:equation draw:name="f123" draw:formula="?f47 + ?f119"/>
            <draw:equation draw:name="f124" draw:formula="?f48 + ?f120"/>
            <draw:equation draw:name="f125" draw:formula="?f47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5"/>
            <draw:equation draw:name="f135" draw:formula="if(?f134, ?f55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3"/>
            <draw:equation draw:name="f140" draw:formula="?f66 * ?f54"/>
            <draw:equation draw:name="f141" draw:formula="sqrt(?f139 * ?f139 + ?f140 * ?f140 + 0 * 0)"/>
            <draw:equation draw:name="f142" draw:formula="?f53 * ?f54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3"/>
            <draw:equation draw:name="f148" draw:formula="?f146 - ?f54"/>
            <draw:equation draw:name="f149" draw:formula="?f144 + ?f53"/>
            <draw:equation draw:name="f150" draw:formula="?f146 + ?f54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3"/>
            <draw:equation draw:name="f157" draw:formula="sin(?f153)"/>
            <draw:equation draw:name="f158" draw:formula="0 - ?f157"/>
            <draw:equation draw:name="f159" draw:formula="?f158 * ?f54"/>
            <draw:equation draw:name="f160" draw:formula="sqrt(?f156 * ?f156 + ?f159 * ?f159 + 0 * 0)"/>
            <draw:equation draw:name="f161" draw:formula="?f53 * ?f54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  <draw:custom-shape svg:width="0.28375in" svg:height="0.20332in" draw:id="id72" draw:style-name="a362" draw:transform="translate(-0.14187in -0.10166in) rotate(-0.4857) translate(3.52993in 4.60566in)" draw:name="Pijl: omlaag 16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73" draw:style-name="a363" draw:name="Picture 2" svg:x="5.59in" svg:y="3.75in" svg:width="7.33328in" svg:height="3.3066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364" draw:master-page-name="Master1-Layout2-obj-Titel-en-object" presentation:presentation-page-layout-name="Master1-PPL2" draw:id="Slide-257">
        <draw:frame draw:id="id74" presentation:style-name="a367" draw:name="Titel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Wat hebben we al?</text:span></text:p>
          </draw:text-box>
          <svg:title/>
          <svg:desc/>
        </draw:frame>
        <draw:frame draw:id="id75" presentation:style-name="a377" draw:name="Tijdelijke aanduiding voor inhoud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Functionele en non-functionele requirements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Gesprekvoorbereiding<text:s text:c="1"/>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</draw:text-box>
          <svg:title/>
          <svg:desc/>
        </draw:frame>
        <draw:frame draw:id="id76" draw:style-name="a378" draw:name="Afbeelding 4" svg:x="7.5911in" svg:y="2.75in" svg:width="5.34091in" svg:height="3.89632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379" draw:name="Afbeelding 6" svg:x="1.13542in" svg:y="3.40538in" svg:width="5.26044in" svg:height="3.6953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" draw:style-name="a380" draw:master-page-name="Master1-Layout2-obj-Titel-en-object" presentation:presentation-page-layout-name="Master1-PPL2" draw:id="Slide-258">
        <draw:frame draw:id="id78" presentation:style-name="a383" draw:name="Titel 1" svg:x="0.2626in" svg:y="1.04915in" svg:width="1.61792in" svg:height="1.44965in" presentation:class="title" presentation:placeholder="false">
          <draw:text-box>
            <text:p text:style-name="a382" text:class-names="" text:cond-style-name=""><text:span text:style-name="a381" text:class-names="">Waar gaan we voor:</text:span></text:p>
          </draw:text-box>
          <svg:title/>
          <svg:desc/>
        </draw:frame>
        <draw:frame draw:id="id79" draw:style-name="a384" draw:name="Picture 2" svg:x="2.30333in" svg:y="0.39024in" svg:width="8.51in" svg:height="3.83724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417" draw:name="Tekstvak 4" svg:x="9.32583in" svg:y="4.86621in" svg:width="3.91in" svg:height="1.58197in">
          <draw:text-box>
            <text:p text:style-name="a386" text:class-names="" text:cond-style-name=""><text:span text:style-name="a385" text:class-names="">Basis: Adriaan</text:span></text:p>
            <text:list text:style-name="a390">
              <text:list-item>
                <text:p text:style-name="a389" text:class-names="" text:cond-style-name=""><text:span text:style-name="a387" text:class-names="">Milestone</text:span><text:span text:style-name="a388" text:class-names=""><text:s text:c="1"/>1: Vorm<text:s text:c="1"/></text:span></text:p>
              </text:list-item>
            </text:list>
            <text:list text:style-name="a400">
              <text:list-item>
                <text:p text:style-name="a399" text:class-names="" text:cond-style-name=""><text:span text:style-name="a391" text:class-names="">Milestone</text:span><text:span text:style-name="a392" text:class-names=""><text:s text:c="1"/></text:span><text:span text:style-name="a393" text:class-names="">2:</text:span><text:span text:style-name="a394" text:class-names=""><text:s text:c="1"/></text:span><text:span text:style-name="a395" text:class-names="">Verbinden</text:span><text:span text:style-name="a396" text:class-names=""><text:s text:c="1"/></text:span><text:span text:style-name="a397" text:class-names="">(onderling)</text:span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Milestone</text:span><text:span text:style-name="a402" text:class-names=""><text:s text:c="1"/>3: Verbinden (extern)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Milestone</text:span><text:span text:style-name="a406" text:class-names=""><text:s text:c="1"/>4: Draaien</text:span></text:p>
              </text:list-item>
            </text:list>
            <text:list text:style-name="a416">
              <text:list-item>
                <text:p text:style-name="a415" text:class-names="" text:cond-style-name=""><text:span text:style-name="a409" text:class-names="">Milestone</text:span><text:span text:style-name="a410" text:class-names=""><text:s text:c="1"/></text:span><text:span text:style-name="a411" text:class-names="">5</text:span><text:span text:style-name="a412" text:class-names="">:<text:s text:c="1"/></text:span><text:span text:style-name="a413" text:class-names="">Sensor toevoegen</text:span><text:span text:style-name="a414" text:class-names=""/></text:p>
              </text:list-item>
            </text:list>
          </draw:text-box>
          <svg:title/>
          <svg:desc/>
        </draw:frame>
        <draw:frame draw:id="id81" draw:style-name="a464" draw:name="Tekstvak 5" svg:x="4.73833in" svg:y="5.36889in" svg:width="3.64in" svg:height="1.81758in">
          <draw:text-box>
            <text:p text:style-name="a419" text:class-names="" text:cond-style-name=""><text:span text:style-name="a418" text:class-names="">Segmenten: Jente &amp; Tim</text:span></text:p>
            <text:list text:style-name="a423">
              <text:list-item>
                <text:p text:style-name="a422" text:class-names="" text:cond-style-name=""><text:span text:style-name="a420" text:class-names="">Milestone</text:span><text:span text:style-name="a421" text:class-names=""><text:s text:c="1"/>1: Vorm</text:span></text:p>
              </text:list-item>
            </text:list>
            <text:list text:style-name="a429">
              <text:list-item>
                <text:p text:style-name="a428" text:class-names="" text:cond-style-name=""><text:span text:style-name="a424" text:class-names="">Milestone</text:span><text:span text:style-name="a425" text:class-names=""><text:s text:c="1"/>2:<text:s text:c="1"/></text:span><text:span text:style-name="a426" text:class-names="">Verbinden</text:span><text:span text:style-name="a427" text:class-names=""><text:s text:c="1"/>(onderling)</text:span></text:p>
              </text:list-item>
            </text:list>
            <text:list text:style-name="a437">
              <text:list-item>
                <text:p text:style-name="a436" text:class-names="" text:cond-style-name=""><text:span text:style-name="a430" text:class-names="">Milestone</text:span><text:span text:style-name="a431" text:class-names=""><text:s text:c="1"/></text:span><text:span text:style-name="a432" text:class-names="">3:</text:span><text:span text:style-name="a433" text:class-names=""><text:s text:c="1"/></text:span><text:span text:style-name="a434" text:class-names="">Verbinden (extern)</text:span><text:span text:style-name="a435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38" text:class-names="">Milestone</text:span><text:span text:style-name="a439" text:class-names=""><text:s text:c="1"/></text:span><text:span text:style-name="a440" text:class-names="">4</text:span><text:span text:style-name="a441" text:class-names="">:<text:s text:c="1"/></text:span><text:span text:style-name="a442" text:class-names="">Beweging</text:span></text:p>
              </text:list-item>
            </text:list>
            <text:list text:style-name="a451">
              <text:list-item>
                <text:p text:style-name="a450" text:class-names="" text:cond-style-name=""><text:span text:style-name="a445" text:class-names="">Milestone</text:span><text:span text:style-name="a446" text:class-names=""><text:s text:c="1"/></text:span><text:span text:style-name="a447" text:class-names="">5</text:span><text:span text:style-name="a448" text:class-names="">:<text:s text:c="1"/></text:span><text:span text:style-name="a449" text:class-names="">Sensoren toevoegen</text:span></text:p>
              </text:list-item>
            </text:list>
            <text:list text:style-name="a463">
              <text:list-item>
                <text:p text:style-name="a462" text:class-names="" text:cond-style-name=""><text:span text:style-name="a452" text:class-names="">Milestone</text:span><text:span text:style-name="a453" text:class-names=""><text:s text:c="1"/></text:span><text:span text:style-name="a454" text:class-names="">6</text:span><text:span text:style-name="a455" text:class-names="">:<text:s text:c="1"/></text:span><text:span text:style-name="a456" text:class-names="">3</text:span><text:span text:style-name="a457" text:class-names="">e</text:span><text:span text:style-name="a458" text:class-names=""><text:s text:c="1"/></text:span><text:span text:style-name="a459" text:class-names="">Segment</text:span><text:span text:style-name="a460" text:class-names=""><text:s text:c="1"/></text:span><text:span text:style-name="a461" text:class-names="">toevoegen</text:span></text:p>
              </text:list-item>
            </text:list>
          </draw:text-box>
          <svg:title/>
          <svg:desc/>
        </draw:frame>
        <draw:frame draw:id="id82" draw:style-name="a507" draw:name="Tekstvak 6" svg:x="0.50499in" svg:y="5.17527in" svg:width="3.54501in" svg:height="1.81758in">
          <draw:text-box>
            <text:p text:style-name="a466" text:class-names="" text:cond-style-name=""><text:span text:style-name="a465" text:class-names="">Kop: Erin &amp; Joni</text:span></text:p>
            <text:list text:style-name="a472">
              <text:list-item>
                <text:p text:style-name="a471" text:class-names="" text:cond-style-name=""><text:span text:style-name="a467" text:class-names="">Milestone</text:span><text:span text:style-name="a468" text:class-names=""><text:s text:c="1"/>1:<text:s text:c="1"/></text:span><text:span text:style-name="a469" text:class-names="">Vorm</text:span><text:span text:style-name="a470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3" text:class-names="">Milestone</text:span><text:span text:style-name="a474" text:class-names=""><text:s text:c="1"/></text:span><text:span text:style-name="a475" text:class-names="">2:</text:span><text:span text:style-name="a476" text:class-names=""><text:s text:c="1"/></text:span><text:span text:style-name="a477" text:class-names="">Verbinden (onderling)</text:span></text:p>
              </text:list-item>
            </text:list>
            <text:list text:style-name="a487">
              <text:list-item>
                <text:p text:style-name="a486" text:class-names="" text:cond-style-name=""><text:span text:style-name="a480" text:class-names="">Milestone</text:span><text:span text:style-name="a481" text:class-names=""><text:s text:c="1"/></text:span><text:span text:style-name="a482" text:class-names="">3:</text:span><text:span text:style-name="a483" text:class-names=""><text:s text:c="1"/></text:span><text:span text:style-name="a484" text:class-names="">Verbinden (extern)</text:span><text:span text:style-name="a485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Milestone</text:span><text:span text:style-name="a489" text:class-names=""><text:s text:c="1"/>4: Draaien</text:span></text:p>
              </text:list-item>
            </text:list>
            <text:list text:style-name="a498">
              <text:list-item>
                <text:p text:style-name="a497" text:class-names="" text:cond-style-name=""><text:span text:style-name="a492" text:class-names="">Milestone</text:span><text:span text:style-name="a493" text:class-names=""><text:s text:c="1"/></text:span><text:span text:style-name="a494" text:class-names="">5</text:span><text:span text:style-name="a495" text:class-names="">:<text:s text:c="1"/></text:span><text:span text:style-name="a496" text:class-names="">Sensoren toevoegen</text:span></text:p>
              </text:list-item>
            </text:list>
            <text:list text:style-name="a506">
              <text:list-item>
                <text:p text:style-name="a505" text:class-names="" text:cond-style-name=""><text:span text:style-name="a499" text:class-names="">Milestone</text:span><text:span text:style-name="a500" text:class-names=""><text:s text:c="1"/></text:span><text:span text:style-name="a501" text:class-names="">6</text:span><text:span text:style-name="a502" text:class-names="">:</text:span><text:span text:style-name="a503" text:class-names=""><text:s text:c="1"/>Knijpen</text:span><text:span text:style-name="a504" text:class-names=""/></text:p>
              </text:list-item>
            </text:list>
          </draw:text-box>
          <svg:title/>
          <svg:desc/>
        </draw:frame>
        <draw:connector draw:type="line" svg:x1="1.33013in" svg:y1="5.13856in" svg:x2="3.86643in" svg:y2="3.20246in" draw:id="id83" draw:style-name="a509" draw:name="Rechte verbindingslijn met pijl 8">
          <svg:title/>
          <svg:desc/>
        </draw:connector>
        <draw:connector draw:type="line" svg:x1="2.80969in" svg:y1="5.13856in" svg:x2="5.09438in" svg:y2="2.99329in" draw:id="id84" draw:style-name="a511" draw:name="Rechte verbindingslijn met pijl 9">
          <svg:title/>
          <svg:desc/>
        </draw:connector>
        <draw:connector draw:type="line" svg:x1="5.64354in" svg:y1="5.40332in" svg:x2="7.97979in" svg:y2="3.03in" draw:id="id85" draw:style-name="a513" draw:name="Rechte verbindingslijn met pijl 12">
          <svg:title/>
          <svg:desc/>
        </draw:connector>
        <draw:connector draw:type="line" svg:x1="7.61in" svg:y1="5.36889in" svg:x2="8.85208in" svg:y2="2.14916in" draw:id="id86" draw:style-name="a515" draw:name="Rechte verbindingslijn met pijl 14">
          <svg:title/>
          <svg:desc/>
        </draw:connector>
        <draw:connector draw:type="line" svg:x1="10.985in" svg:y1="1.44599in" draw:start-shape="id87" draw:start-glue-point="0" svg:x2="7.32188in" svg:y2="1.76099in" draw:id="id88" draw:style-name="a517" draw:name="Rechte verbindingslijn met pijl 17">
          <svg:title/>
          <svg:desc/>
        </draw:connector>
        <draw:connector draw:type="line" svg:x1="11.68875in" svg:y1="0.5845in" draw:start-shape="id89" draw:start-glue-point="0" svg:x2="7.97979in" svg:y2="1.02024in" draw:id="id90" draw:style-name="a519" draw:name="Rechte verbindingslijn met pijl 21">
          <svg:title/>
          <svg:desc/>
        </draw:connector>
        <draw:custom-shape svg:x="10.94in" svg:y="1.44599in" svg:width="0.09in" svg:height="3.42022in" draw:id="id87" draw:style-name="a522" draw:name="Rechthoek 33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5896in" svg:y="0.5845in" svg:width="0.05958in" svg:height="4.28171in" draw:id="id89" draw:style-name="a525" draw:name="Rechthoek 34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516" svg:viewBox="0 0 20 30" svg:d="m10 0-10 30h20z"/>
    <draw:marker draw:name="a510" svg:viewBox="0 0 20 30" svg:d="m10 0-10 30h20z"/>
    <draw:marker draw:name="a518" svg:viewBox="0 0 20 30" svg:d="m10 0-10 30h20z"/>
    <draw:marker draw:name="a512" svg:viewBox="0 0 20 30" svg:d="m10 0-10 30h20z"/>
    <draw:marker draw:name="a508" svg:viewBox="0 0 20 30" svg:d="m10 0-10 30h20z"/>
    <draw:marker draw:name="a51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-3-2026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-3-2026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-3-2026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-3-2026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-3-2026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-3-2026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-3-2026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-3-2026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-3-2026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-3-2026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-3-2026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-3-2026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ni Klumpenaar</meta:initial-creator>
    <dc:creator>Joni Klumpenaar</dc:creator>
    <meta:creation-date>2026-03-11T12:06:30Z</meta:creation-date>
    <dc:date>2026-03-19T10:35:09Z</dc:date>
    <meta:editing-cycles>4</meta:editing-cycles>
    <meta:editing-duration>PT163500S</meta:editing-duration>
    <meta:document-statistic meta:paragraph-count="27" meta:word-count="128"/>
  </office:meta>
</office:document-meta>
</file>